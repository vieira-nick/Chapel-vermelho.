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A20000043CACD20E026ED7AAC4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as-char" svg:width="6.2681in" svg:height="10.0835in" draw:z-index="0"><draw:image xlink:href="Pictures/10000000000002A20000043CACD20E026ED7AAC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