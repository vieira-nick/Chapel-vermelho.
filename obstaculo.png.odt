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0000003FD2C28487A0AE7144A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2681in" svg:height="8.6945in" draw:z-index="0"><draw:image xlink:href="Pictures/10000000000002E0000003FD2C28487A0AE714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